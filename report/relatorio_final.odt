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Google Sans Text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2pt" fo:font-weight="bold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2pt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2pt" officeooo:paragraph-rsid="0000cdc0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8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size="12pt" style:font-size-asian="12pt" style:font-size-complex="12pt"/>
    </style:style>
    <style:style style:name="P9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size="12pt" style:font-size-asian="12pt" style:font-size-complex="12pt"/>
    </style:style>
    <style:style style:name="P10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size="12pt" style:font-size-asian="12pt" style:font-size-complex="12pt"/>
    </style:style>
    <style:style style:name="P11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size="12pt" style:font-size-asian="12pt" style:font-size-complex="12pt"/>
    </style:style>
    <style:style style:name="P12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size="12pt" officeooo:paragraph-rsid="000443b0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2pt" fo:font-weight="bold" officeooo:paragraph-rsid="00060234" style:font-size-asian="12pt" style:font-weight-asian="bold" style:font-size-complex="12pt" style:font-weight-complex="bold"/>
    </style:style>
    <style:style style:name="P14" style:family="paragraph" style:parent-style-name="Text_20_body" style:list-style-name="L5">
      <style:paragraph-properties fo:margin-top="0in" fo:margin-bottom="0.0972in" style:contextual-spacing="false" fo:line-height="114%"/>
      <style:text-properties style:font-name="Google Sans Text" fo:font-size="12pt" fo:font-weight="normal" officeooo:paragraph-rsid="00060234" style:font-size-asian="12pt" style:font-weight-asian="normal" style:font-size-complex="12pt" style:font-weight-complex="normal"/>
    </style:style>
    <style:style style:name="P15" style:family="paragraph" style:parent-style-name="Text_20_body" style:list-style-name="L6">
      <style:paragraph-properties fo:margin-top="0in" fo:margin-bottom="0.0972in" style:contextual-spacing="false" fo:line-height="114%"/>
      <style:text-properties style:font-name="Google Sans Text" fo:font-size="12pt" fo:font-weight="normal" officeooo:paragraph-rsid="00060234" style:font-size-asian="12pt" style:font-weight-asian="normal" style:font-size-complex="12pt" style:font-weight-complex="normal"/>
    </style:style>
    <style:style style:name="P16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cdc0" style:font-weight-asian="bold" style:font-weight-complex="bold"/>
    </style:style>
    <style:style style:name="T4" style:family="text">
      <style:text-properties style:font-name="Google Sans Text" fo:font-size="12pt" fo:font-weight="bold" style:font-size-asian="12pt" style:font-size-complex="12pt"/>
    </style:style>
    <style:style style:name="T5" style:family="text">
      <style:text-properties style:font-name="Google Sans Text" fo:font-size="12pt" style:font-size-asian="12pt" style:font-size-complex="12pt"/>
    </style:style>
    <style:style style:name="T6" style:family="text">
      <style:text-properties style:font-name="Google Sans Text" fo:font-size="12pt" officeooo:rsid="000443b0" style:font-size-asian="12pt" style:font-size-complex="12pt"/>
    </style:style>
    <style:style style:name="T7" style:family="text">
      <style:text-properties fo:color="#c9211e" loext:opacity="100%" style:font-name="Google Sans Text" fo:font-size="12pt" fo:background-color="#ffff00" loext:char-shading-value="0" style:font-size-asian="12pt" style:font-size-complex="12pt"/>
    </style:style>
    <style:style style:name="T8" style:family="text">
      <style:text-properties fo:color="#c9211e" loext:opacity="100%" style:font-name="Google Sans Text" fo:font-size="12pt" officeooo:rsid="00038c58" fo:background-color="#ffff00" loext:char-shading-value="0" style:font-size-asian="12pt" style:font-size-complex="12pt"/>
    </style:style>
    <style:style style:name="T9" style:family="text">
      <style:text-properties officeooo:rsid="000443b0"/>
    </style:style>
    <style:style style:name="T10" style:family="text">
      <style:text-properties style:font-name="Liberation Serif" fo:font-size="14pt" officeooo:rsid="000443b0" style:font-name-asian="Liberation Serif" style:font-size-asian="14pt" style:font-name-complex="Liberation Serif" style:font-size-complex="14pt"/>
    </style:style>
    <style:style style:name="T11" style:family="text">
      <style:text-properties officeooo:rsid="0006023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opo do Relatório Técnico</text:p>
      <text:p text:style-name="P1"/>
      <text:p text:style-name="P2"><text:bookmark text:name="p-rc_179e16bcabf44f84-25"/>1. Contextualização e Justificativa </text:p>
      <text:p text:style-name="P5"><text:span text:style-name="T1">Grupo:</text:span> Davi Correa Paião (RA: 560438), Marcos Vinicius Gonçalves Santos (RA: 560062), Matheus Ricardo Parreira da Silva (RA: 560099).</text:p>
      <text:p text:style-name="P4">Cenários Escolhidos:</text:p>
      <text:list text:style-name="L1">
        <text:list-item>
          <text:p text:style-name="P8"><text:bookmark text:name="p-rc_179e16bcabf44f84-26"/><text:span text:style-name="T1">Cenário A (Seca no MATOPIBA):</text:span> Essencial devido às severas perdas de safra na região. Utilizamos dados sintéticos que mimetizam anomalias de NDVI (MODIS), criando grandes clusters de alto risco logístico e necessidade de alocação de insumos. </text:p>
        </text:list-item>
        <text:list-item>
          <text:p text:style-name="P8"><text:bookmark text:name="p-rc_179e16bcabf44f84-27"/><text:span text:style-name="T1">Cenário B (Inundações no Sul):</text:span> Simula a malha de 478 municípios afetados no RS em 2024. A topologia impõe células bloqueadas (custo = -1) representando pontes caídas e acesso fluvial exclusivo, testando a robustez dos algoritmos de desvio de rotas. </text:p>
        </text:list-item>
      </text:list>
      <text:p text:style-name="P3"><text:bookmark text:name="p-rc_179e16bcabf44f84-28"/>2. Formulação Matemática </text:p>
      <text:p text:style-name="P5"><text:bookmark text:name="p-rc_179e16bcabf44f84-29"/>O problema exige a minimização do custo logístico simultaneamente à maximização da cobertura de áreas de alto risco. Modelamos isso através do custo efetivo ponderado: W[i][j] = c[i][j] x (1 - r[i][j]). A recorrência da Programação Dinâmica assume subestrutura ótima, garantindo que o subcaminho de (0,0) até (i,j) contido no caminho ótimo total também é ótimo. </text:p>
      <text:p text:style-name="P5"><text:bookmark text:name="p-rc_179e16bcabf44f84-30"/>A recorrência é definida por: </text:p>
      <text:p text:style-name="P5">dp[i][j] = W[i][j] + \min(dp[i-1][j], dp[i][j-1])</text:p>
      <text:p text:style-name="P5"><text:bookmark text:name="p-rc_179e16bcabf44f84-31"/>Condições e Casos Base: </text:p>
      <text:list text:style-name="L2">
        <text:list-item>
          <text:p text:style-name="P9">Bloqueio: Se c[i][j] = -1, então W[i][j] = <text:span text:style-name="T10">∞</text:span></text:p>
        </text:list-item>
        <text:list-item>
          <text:p text:style-name="P9">Origem: dp[0][0] = W[0][0].</text:p>
        </text:list-item>
        <text:list-item>
          <text:p text:style-name="P9">Bordas (Direção única): dp[i][0] = dp[i-1][0] + W[i][0] e dp[0][j] = dp[0][j-1] + W[0][j].</text:p>
        </text:list-item>
        <text:list-item>
          <text:p text:style-name="P9"><text:bookmark text:name="p-rc_179e16bcabf44f84-32"/>O destino final é dado pela menor célula na fronteira: \min(\min_{j} dp[N-1][j], \min_{i} dp[i][M-1]). <text:line-break/><text:line-break/><text:line-break/></text:p>
        </text:list-item>
      </text:list>
      <text:p text:style-name="P5"><text:bookmark text:name="p-rc_179e16bcabf44f84-33"/><text:soft-page-break/><text:span text:style-name="T2">3. Análise de Complexidade Teórica</text:span> </text:p>
      <text:list text:style-name="L3">
        <text:list-item>
          <text:p text:style-name="P10"><text:bookmark text:name="p-rc_179e16bcabf44f84-34"/><text:span text:style-name="T1">Força Bruta:</text:span> Tempo O(2^{N+M}) pois em cada célula existem no máximo 2 decisões (direita, baixo). O espaço é O(N+M) relativo à profundidade da pilha de recursão. </text:p>
        </text:list-item>
        <text:list-item>
          <text:p text:style-name="P16"><text:bookmark text:name="p-rc_179e16bcabf44f84-35"/><text:span text:style-name="T4">Programação Dinâmica (Bottom-up):</text:span><text:span text:style-name="T5"> Tempo O(N </text:span><text:span text:style-name="T6">x</text:span><text:span text:style-name="T5"> M) iterando por todas as células da matriz. Espaço O(N x M) para armazenar a tabela </text:span><text:span text:style-name="Source_20_Text"><text:span text:style-name="T5">dp</text:span></text:span><text:span text:style-name="T5">. Totalmente escalável para grades 100 x 100. </text:span></text:p>
        </text:list-item>
        <text:list-item>
          <text:p text:style-name="P10"><text:bookmark text:name="p-rc_179e16bcabf44f84-36"/><text:span text:style-name="T1">Monte Carlo:</text:span> Tempo O(K x N x M), pois executa o algoritmo DP K vezes. Sendo K = 10.000, exige otimização do laço interno. O espaço extra é O(K) para gravar os custos ótimos.</text:p>
        </text:list-item>
      </text:list>
      <text:p text:style-name="P6"><text:span text:style-name="T3">4</text:span><text:span text:style-name="T2">. </text:span><text:span text:style-name="T3">Resultados</text:span></text:p>
      <text:p text:style-name="P7"><text:bookmark text:name="p-rc_179e16bcabf44f84-37"/><text:span text:style-name="T7">(Nota: </text:span><text:span text:style-name="T8">E</text:span><text:span text:style-name="T7">xportar </text:span><text:span text:style-name="T8">aqui</text:span><text:span text:style-name="T7"> as imagens geradas pelos scripts </text:span><text:span text:style-name="Source_20_Text"><text:span text:style-name="T7">visualizations.py</text:span></text:span><text:span text:style-name="T7">) </text:span></text:p>
      <text:p text:style-name="P5"><text:bookmark text:name="p-rc_179e16bcabf44f84-38"/><text:span text:style-name="T2">5. Escala de Decisão</text:span> </text:p>
      <text:p text:style-name="P5"><text:bookmark text:name="p-rc_179e16bcabf44f84-39"/>Com base na análise de restrição (Trade-off de tempo vs custo ), a escala de decisão para acionamento na plataforma é: </text:p>
      <text:list text:style-name="L4">
        <text:list-item>
          <text:p text:style-name="P11"><text:span text:style-name="T1">Nível 1 (Crise Imediata - Inundação Sul):</text:span> Exige cálculo de rota em &lt;10ms. Usamos puramente o algoritmo de DP 2D sem simulação Monte Carlo. Risco logístico é isolado e contornado.</text:p>
        </text:list-item>
        <text:list-item>
          <text:p text:style-name="P12"><text:bookmark text:name="p-rc_179e16bcabf44f84-40"/><text:span text:style-name="T1">Nível 2 (Planejamento Tático - Seca MATOPIBA):</text:span> Necessita de avaliação de risco. Acionamento de Monte Carlo com K=10.000. Leva alguns segundos, mas entrega o IC 95% para embasar o orçamento logístico. </text:p>
        </text:list-item>
        <text:list-item>
          <text:p text:style-name="P11"><text:bookmark text:name="p-rc_179e16bcabf44f84-41"/><text:span text:style-name="T1">Nível 3 (Análise Sensível):</text:span> Execução do MC com variação de p[i][j] <text:span text:style-name="T9">+- 20%</text:span> para mapear cenários de degradação climática severa (El Niño). </text:p>
        </text:list-item>
      </text:list>
      <text:p text:style-name="P5"><text:bookmark text:name="p-rc_179e16bcabf44f84-42"/><text:span text:style-name="T2">6. Conclusão e Conexão ODS</text:span> </text:p>
      <text:p text:style-name="P5"><text:bookmark text:name="p-rc_179e16bcabf44f84-43"/>A solução via Programação Dinâmica provou-se altamente eficiente na otimização de resposta rápida. Conectamos diretamente aos <text:span text:style-name="T1">ODS 9 e 13</text:span> ao utilizar infraestrutura de dados orbitais resilientes (NASA/ESA) para ação climática direta. Ao agilizar o resgate em inundações e focar nas secas, ataca-se o <text:span text:style-name="T1">ODS 2</text:span> (proteção à agricultura contra eventos extremos). Recomenda-se a implementação em nuvem pública (AWS/GCP) da Defesa Civil Nacional.</text:p>
      <text:p text:style-name="P13"><text:span text:style-name="T11">7</text:span>. <text:span text:style-name="T11">Referências</text:span></text:p>
      <text:list text:style-name="L5">
        <text:list-item>
          <text:p text:style-name="P14">NASA Earthdata (MODIS NDVI, SRTM): earthdata.nasa.gov</text:p>
        </text:list-item>
        <text:list-item>
          <text:p text:style-name="P14">ESA Copernicus Open Access Hub (Sentinel-1/2): scihub.copernicus.eu</text:p>
        </text:list-item>
        <text:list-item>
          <text:p text:style-name="P14"><text:soft-page-break/>INPE PRODES/DETER (desmatamento Amazônia): terrabrasilis.dpi.inpe.br</text:p>
        </text:list-item>
        <text:list-item>
          <text:p text:style-name="P14">ANA — Agência Nacional de Águas (pluviometria): hidroweb.ana.gov.br</text:p>
        </text:list-item>
        <text:list-item>
          <text:p text:style-name="P14">INMET (dados climáticos): bdmep.inmet.gov.br</text:p>
        </text:list-item>
        <text:list-item>
          <text:p text:style-name="P14">ANATEL (conectividade): mapa.anatel.gov.br</text:p>
        </text:list-item>
      </text:list>
      <text:list text:style-name="L6">
        <text:list-item>
          <text:p text:style-name="P15">Bellman, R. (1957). Dynamic Programming. Princeton University Press.</text:p>
        </text:list-item>
        <text:list-item>
          <text:p text:style-name="P15">Cormen, T. et al. (2022). Introduction to Algorithms, 4th Ed. MIT Press.</text:p>
        </text:list-item>
        <text:list-item>
          <text:p text:style-name="P15">Kroese, D. P. et al. (2011). Handbook of Monte Carlo Methods. Wiley.</text:p>
        </text:list-item>
        <text:list-item>
          <text:p text:style-name="P15">Carta Internacional Space and Major Disasters: disasterscharter.org</text:p>
        </text:list-item>
        <text:list-item>
          <text:p text:style-name="P15">NASA Artemis Program: nasa.gov/artemis</text:p>
        </text:list-item>
        <text:list-item>
          <text:p text:style-name="P15">ESA Earth Observation: esa.int/Applications/Observing_the_Earth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3T15:24:41.352969437</meta:creation-date>
    <dc:date>2026-06-03T17:34:02.755902439</dc:date>
    <meta:editing-duration>PT22M56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3" meta:paragraph-count="41" meta:word-count="607" meta:character-count="3972" meta:non-whitespace-character-count="3409"/>
  </office:meta>
</office:document-meta>
</file>